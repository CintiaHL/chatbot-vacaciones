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7000002F8677C006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25cm" svg:height="26.404cm" svg:x="3.25cm" svg:y="1.305cm">
          <draw:image xlink:href="Pictures/10000001000001B7000002F8677C006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20:10:09.187230200</meta:creation-date>
    <dc:date>2026-06-25T20:10:57.830473500</dc:date>
    <meta:editing-duration>PT49S</meta:editing-duration>
    <meta:editing-cycles>1</meta:editing-cycles>
    <meta:document-statistic meta:object-count="1"/>
    <meta:generator>LibreOffice/26.2.4.2$Windows_X86_64 LibreOffice_project/0229ac93fcf0d7cbc6376066c6f35021cef002dc</meta:generator>
  </office:meta>
</office:document-meta>
</file>